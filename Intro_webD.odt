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fo:font-size="12pt" fo:font-style="italic" style:text-underline-style="none" fo:font-weight="normal" officeooo:rsid="0003960a" officeooo:paragraph-rsid="0003960a" style:font-size-asian="10.5pt" style:font-style-asian="italic" style:font-weight-asian="normal" style:font-size-complex="12pt" style:font-style-complex="italic" style:font-weight-complex="normal"/>
    </style:style>
    <style:style style:name="P2" style:family="paragraph" style:parent-style-name="Heading_20_3">
      <style:text-properties style:text-underline-style="none" fo:font-weight="normal" style:font-weight-asian="normal" style:font-weight-complex="normal"/>
    </style:style>
    <style:style style:name="P3" style:family="paragraph" style:parent-style-name="Heading_20_3">
      <style:text-properties style:text-underline-style="none" fo:font-weight="normal" officeooo:rsid="0003960a" style:font-weight-asian="normal" style:font-weight-complex="normal"/>
    </style:style>
    <style:style style:name="P4"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03960a" officeooo:paragraph-rsid="0003960a" style:font-size-asian="18pt" style:font-style-asian="italic" style:font-weight-asian="bold" style:font-size-complex="18pt" style:font-style-complex="italic" style:font-weight-complex="bold"/>
    </style:style>
    <style:style style:name="P5" style:family="paragraph" style:parent-style-name="Standard">
      <style:paragraph-properties fo:text-align="start" style:justify-single-word="false"/>
      <style:text-properties fo:font-size="12pt" fo:font-style="italic" style:text-underline-style="none" fo:font-weight="normal" officeooo:rsid="0003960a" officeooo:paragraph-rsid="0003960a" style:font-size-asian="10.5pt" style:font-style-asian="italic" style:font-weight-asian="normal" style:font-size-complex="12pt" style:font-style-complex="italic" style:font-weight-complex="normal"/>
    </style:style>
    <style:style style:name="P6" style:family="paragraph" style:parent-style-name="Text_20_body" style:list-style-name="L2"/>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list-style-name="L2">
      <style:text-properties style:text-underline-style="none" fo:font-weight="normal" style:font-weight-asian="normal" style:font-weight-complex="normal"/>
    </style:style>
    <style:style style:name="P9" style:family="paragraph" style:parent-style-name="Text_20_body" style:list-style-name="L3">
      <style:text-properties style:text-underline-style="none" fo:font-weight="normal" style:font-weight-asian="normal" style:font-weight-complex="normal"/>
    </style:style>
    <style:style style:name="P10" style:family="paragraph" style:parent-style-name="Text_20_body">
      <style:text-properties style:text-underline-style="none" fo:font-weight="normal" officeooo:rsid="0003960a" style:font-weight-asian="normal" style:font-weight-complex="normal"/>
    </style:style>
    <style:style style:name="P11" style:family="paragraph" style:parent-style-name="Text_20_body" style:list-style-name="L1">
      <style:text-properties style:text-underline-style="none" fo:font-weight="normal" style:font-weight-asian="normal" style:font-weight-complex="normal"/>
    </style:style>
    <style:style style:name="P12" style:family="paragraph" style:parent-style-name="Text_20_body" style:list-style-name="L4">
      <style:text-properties style:text-underline-style="none" fo:font-weight="normal" style:font-weight-asian="normal" style:font-weight-complex="normal"/>
    </style:style>
    <style:style style:name="P13" style:family="paragraph" style:parent-style-name="Text_20_body" style:list-style-name="L5">
      <style:text-properties style:text-underline-style="none" fo:font-weight="normal" style:font-weight-asian="normal" style:font-weight-complex="normal"/>
    </style:style>
    <style:style style:name="P14" style:family="paragraph" style:parent-style-name="Text_20_body" style:list-style-name="L6">
      <style:text-properties style:text-underline-style="none" fo:font-weight="normal" style:font-weight-asian="normal" style:font-weight-complex="normal"/>
    </style:style>
    <style:style style:name="P15" style:family="paragraph" style:parent-style-name="Text_20_body" style:list-style-name="L7">
      <style:text-properties style:text-underline-style="none" fo:font-weight="normal" style:font-weight-asian="normal" style:font-weight-complex="normal"/>
    </style:style>
    <style:style style:name="P16" style:family="paragraph" style:parent-style-name="Text_20_body" style:list-style-name="L8">
      <style:text-properties style:text-underline-style="none" fo:font-weight="normal" style:font-weight-asian="normal" style:font-weight-complex="normal"/>
    </style:style>
    <style:style style:name="P17" style:family="paragraph" style:parent-style-name="Text_20_body" style:list-style-name="L9">
      <style:text-properties style:text-underline-style="none" fo:font-weight="normal" style:font-weight-asian="normal" style:font-weight-complex="normal"/>
    </style:style>
    <style:style style:name="P18" style:family="paragraph" style:parent-style-name="Text_20_body" style:list-style-name="L10">
      <style:text-properties style:text-underline-style="none" fo:font-weight="normal" style:font-weight-asian="normal" style:font-weight-complex="normal"/>
    </style:style>
    <style:style style:name="P19" style:family="paragraph" style:parent-style-name="Text_20_body" style:list-style-name="L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ignment 1</text:p>
      <text:p text:style-name="P4"/>
      <text:h text:style-name="P1" text:outline-level="3">1. Frontend , Backend, and Full-Stack Development</text:h>
      <text:list xml:id="list2996408403" text:style-name="L1">
        <text:list-item>
          <text:p text:style-name="P11">Frontend is everything the user sees and interacts with in a browser. It's the client-side of the application.</text:p>
          <text:list>
            <text:list-item>
              <text:p text:style-name="P11">Real-world example: When you use Facebook, the layout, buttons, colors, and forms you click on are all part of the frontend.</text:p>
            </text:list-item>
          </text:list>
        </text:list-item>
        <text:list-item>
          <text:p text:style-name="P11">Backend is the server-side of the application. It manages the database, user authentication, and the application's logic. It's the part you don't see.</text:p>
          <text:list>
            <text:list-item>
              <text:p text:style-name="P11">Real-world example: When you log in to Facebook, the backend processes your request, checks your password against the database, and fetches your profile data to send back to the frontend.</text:p>
            </text:list-item>
          </text:list>
        </text:list-item>
        <text:list-item>
          <text:p text:style-name="P11">Full-stack development combines both frontend and backend. A full-stack developer can work on all parts of an application, from the user interface to the server and database.</text:p>
          <text:p text:style-name="P11"/>
        </text:list-item>
      </text:list>
      <text:h text:style-name="P1" text:outline-level="3">2. Client-Server Model Diagram</text:h>
      <text:p text:style-name="P7">The client-server model is a structure that distributes tasks between servers, which provide a service or resource, and clients, which request them. In web architecture, your browser is the client that requests a webpage from a web server.</text:p>
      <text:p text:style-name="P7"/>
      <text:h text:style-name="P2" text:outline-level="3">3. How a Browser Displays a Web Page</text:h>
      <text:list xml:id="list3620419454" text:style-name="L2">
        <text:list-item>
          <text:p text:style-name="P6"><text:span text:style-name="T4">You type a URL: You enter a web address (e.g., </text:span><text:span text:style-name="Source_20_Text"><text:span text:style-name="T4">www.google.com</text:span></text:span><text:span text:style-name="T4">) into your browser's address bar and press Enter.</text:span></text:p>
        </text:list-item>
        <text:list-item>
          <text:p text:style-name="P8">DNS Lookup: The browser sends a request to the Domain Name System (DNS) to find the IP address associated with that domain name.</text:p>
        </text:list-item>
        <text:list-item>
          <text:p text:style-name="P8">HTTP Request: The browser sends an HTTP (Hypertext Transfer Protocol) request to the web server at that IP address, asking for the specific webpage.</text:p>
        </text:list-item>
        <text:list-item>
          <text:p text:style-name="P8">Server Processes Request: The server receives the request, finds the necessary files (HTML, CSS, JavaScript, images), and processes any backend logic.</text:p>
        </text:list-item>
        <text:list-item>
          <text:p text:style-name="P8">HTTP Response: The server sends an HTTP response back to the browser, which includes the files for the webpage.</text:p>
        </text:list-item>
        <text:list-item>
          <text:p text:style-name="P8">Rendering: The browser's rendering engine parses the HTML to create the structure (DOM), applies the styles from the CSS, and executes any JavaScript.</text:p>
        </text:list-item>
        <text:list-item>
          <text:p text:style-name="P8">Display: The browser displays the fully rendered, interactive webpage on your screen.</text:p>
        </text:list-item>
      </text:list>
      <text:p text:style-name="P7"/>
      <text:h text:style-name="P2" text:outline-level="3"><text:soft-page-break/>4. Web Development Environment Tools</text:h>
      <text:p text:style-name="P7">Setting up a web development environment involves several key tools:</text:p>
      <text:list xml:id="list1520203486" text:style-name="L3">
        <text:list-item>
          <text:p text:style-name="P9">Code Editor: This is where you write your code.</text:p>
          <text:list>
            <text:list-item>
              <text:p text:style-name="P9">Purpose: To provide a platform for writing and editing HTML, CSS, JavaScript, and other programming languages. Modern editors include features like syntax highlighting, autocompletion, and debugging tools.</text:p>
            </text:list-item>
            <text:list-item>
              <text:p text:style-name="P9">Examples: VS Code, Sublime Text, Atom.</text:p>
            </text:list-item>
          </text:list>
        </text:list-item>
        <text:list-item>
          <text:p text:style-name="P9">Web Browser: This is used to test and view your website.</text:p>
          <text:list>
            <text:list-item>
              <text:p text:style-name="P9">Purpose: To render your code and show you what the end-user will see. Developer tools within browsers are essential for debugging and inspecting your code.</text:p>
            </text:list-item>
            <text:list-item>
              <text:p text:style-name="P9">Examples: Google Chrome, Mozilla Firefox, Microsoft Edge.</text:p>
            </text:list-item>
          </text:list>
        </text:list-item>
        <text:list-item>
          <text:p text:style-name="P9">Version Control System: This tool tracks changes to your code over time.</text:p>
          <text:list>
            <text:list-item>
              <text:p text:style-name="P9">Purpose: To manage your project's history, collaborate with other developers, and revert to previous versions if something breaks.</text:p>
            </text:list-item>
            <text:list-item>
              <text:p text:style-name="P9">Example: Git.</text:p>
            </text:list-item>
          </text:list>
        </text:list-item>
        <text:list-item>
          <text:p text:style-name="P9">Command Line Interface (CLI): A text-based interface to run commands on your computer.</text:p>
          <text:list>
            <text:list-item>
              <text:p text:style-name="P9">Purpose: To use tools like Git, install software packages, and run local servers.</text:p>
            </text:list-item>
            <text:list-item>
              <text:p text:style-name="P9">Examples: Terminal (macOS/Linux), Command Prompt/PowerShell (Windows).</text:p>
            </text:list-item>
          </text:list>
        </text:list-item>
      </text:list>
      <text:p text:style-name="P7"/>
      <text:h text:style-name="P2" text:outline-level="3">5. Web Servers</text:h>
      <text:p text:style-name="P7">A web server is software and hardware that uses HTTP and other protocols to respond to client requests made over the World Wide Web. Its main job is to display website content through storing, processing, and delivering webpages to users.</text:p>
      <text:p text:style-name="P7">Commonly Used Servers:</text:p>
      <text:list xml:id="list2425353260" text:style-name="L4">
        <text:list-item>
          <text:p text:style-name="P12">Apache HTTP Server: One of the oldest and most popular open-source web servers.</text:p>
        </text:list-item>
        <text:list-item>
          <text:p text:style-name="P12">Nginx: A high-performance web server known for its speed and efficiency, often used as a reverse proxy.</text:p>
        </text:list-item>
        <text:list-item>
          <text:p text:style-name="P12">Microsoft IIS (Internet Information Services): A web server created by Microsoft for use with Windows.</text:p>
        </text:list-item>
        <text:list-item>
          <text:p text:style-name="P12">LiteSpeed: A high-performance, Apache-interchangeable web server.</text:p>
        </text:list-item>
      </text:list>
      <text:p text:style-name="P7"/>
      <text:h text:style-name="P2" text:outline-level="3"><text:soft-page-break/>6. Developer Roles in a Project</text:h>
      <text:list xml:id="list821958961" text:style-name="L5">
        <text:list-item>
          <text:p text:style-name="P13">Frontend Developer: This person is responsible for the user interface (UI) and user experience (UX). They build the visual part of the website that users interact with, using languages like HTML, CSS, and JavaScript.</text:p>
        </text:list-item>
        <text:list-item>
          <text:p text:style-name="P13">Backend Developer: This person builds and maintains the server-side of the application. They manage the database, APIs, and the core logic of the website, using languages like Python, Java, Node.js, or PHP.</text:p>
        </text:list-item>
        <text:list-item>
          <text:p text:style-name="P13">Database Administrator (DBA): A DBA is responsible for designing, implementing, maintaining, and repairing an organization's databases. They ensure data is secure, accessible, and performs efficiently.</text:p>
        </text:list-item>
      </text:list>
      <text:p text:style-name="P7"/>
      <text:h text:style-name="P2" text:outline-level="3">7. Install and Configure VS Code</text:h>
      <text:p text:style-name="P7">Visual Studio Code (VS Code) is a popular, free code editor.</text:p>
      <text:list xml:id="list748055420" text:style-name="L6">
        <text:list-item>
          <text:p text:style-name="P19"><text:span text:style-name="T4">Download and Install: Go to the </text:span><text:a xlink:type="simple" xlink:href="https://code.visualstudio.com/" office:target-frame-name="_blank" xlink:show="new" text:style-name="Internet_20_link" text:visited-style-name="Visited_20_Internet_20_Link"><text:span text:style-name="T7">official VS Code website</text:span></text:a><text:span text:style-name="T4">, download the installer for your operating system (Windows, macOS, or Linux), and run it.</text:span></text:p>
        </text:list-item>
        <text:list-item>
          <text:p text:style-name="P14">Configure for Web Development:</text:p>
          <text:list>
            <text:list-item>
              <text:p text:style-name="P14">Install Extensions: Open VS Code and go to the Extensions view (the icon with four squares on the side). Install these essential extensions for HTML, CSS, and JavaScript development:</text:p>
              <text:list>
                <text:list-item>
                  <text:p text:style-name="P14">Live Server: Launches a local development server with a live reload feature.</text:p>
                </text:list-item>
                <text:list-item>
                  <text:p text:style-name="P14">Prettier - Code formatter: Automatically formats your code to keep it clean and consistent.</text:p>
                </text:list-item>
                <text:list-item>
                  <text:p text:style-name="P14">ESLint: Helps you find and fix problems in your JavaScript code.</text:p>
                </text:list-item>
              </text:list>
            </text:list-item>
            <text:list-item>
              <text:p text:style-name="P14">Take a Screenshot: Once installed, your setup might look like this, with the extensions visible in the side panel.</text:p>
            </text:list-item>
          </text:list>
        </text:list-item>
      </text:list>
      <text:p text:style-name="P7"/>
      <text:h text:style-name="P2" text:outline-level="3">8. Static vs. Dynamic Websites</text:h>
      <text:list xml:id="list825656061" text:style-name="L7">
        <text:list-item>
          <text:p text:style-name="P15">Static Websites: These are the most basic type of websites. They are delivered to the user exactly as they are stored, with content that does not change unless the source code is manually updated.</text:p>
          <text:list>
            <text:list-item>
              <text:p text:style-name="P15">Example: A simple portfolio website or a restaurant's menu page that shows the same information to every visitor.</text:p>
            </text:list-item>
          </text:list>
        </text:list-item>
        <text:list-item>
          <text:p text:style-name="P15">Dynamic Websites: These websites can display different content for different users, often based on information from a database. The content is generated in real-time on the server.</text:p>
          <text:list>
            <text:list-item>
              <text:p text:style-name="P15"><text:soft-page-break/>Example: Facebook is a dynamic website. Your news feed is different from your friend's, and it's constantly updated based on new posts and interactions stored in a database.</text:p>
            </text:list-item>
          </text:list>
        </text:list-item>
      </text:list>
      <text:p text:style-name="P10"/>
      <text:h text:style-name="P3" text:outline-level="3">9. Web Browsers and Rendering Engines</text:h>
      <text:p text:style-name="P7">Here are five common web browsers and their rendering engines:</text:p>
      <text:list xml:id="list2462641526" text:style-name="L8">
        <text:list-item>
          <text:p text:style-name="P16">Google Chrome: Uses the Blink rendering engine.</text:p>
        </text:list-item>
        <text:list-item>
          <text:p text:style-name="P16">Mozilla Firefox: Uses the Gecko rendering engine.</text:p>
        </text:list-item>
        <text:list-item>
          <text:p text:style-name="P16">Microsoft Edge: Uses the Blink rendering engine (it's based on Chromium, the same project as Chrome).</text:p>
        </text:list-item>
        <text:list-item>
          <text:p text:style-name="P16">Apple Safari: Uses the WebKit rendering engine.</text:p>
        </text:list-item>
        <text:list-item>
          <text:p text:style-name="P16">Opera: Uses the Blink rendering engine (also based on Chromium).</text:p>
        </text:list-item>
      </text:list>
      <text:p text:style-name="P7">How Rendering Engines Differ: A rendering engine is the core component of a web browser that is responsible for taking the HTML, CSS, and other files and "drawing" them on your screen to create the visual webpage. While they all follow web standards, they can differ in:</text:p>
      <text:list xml:id="list2532613955" text:style-name="L9">
        <text:list-item>
          <text:p text:style-name="P17">Speed and Performance: Some engines are faster at parsing code and rendering pages than others.</text:p>
        </text:list-item>
        <text:list-item>
          <text:p text:style-name="P17">CSS/JavaScript Support: Sometimes, a new CSS or JavaScript feature might be supported by one engine before others, leading to slight differences in how a website looks or behaves across browsers.</text:p>
        </text:list-item>
        <text:list-item>
          <text:p text:style-name="P17">Error Handling: The way engines handle poorly written code can vary.</text:p>
        </text:list-item>
      </text:list>
      <text:p text:style-name="P7"/>
      <text:h text:style-name="P3" text:outline-level="3">10. Basic Web Architecture Flow Diagram</text:h>
      <text:p text:style-name="P7">This diagram shows how the different components of a web application interact.</text:p>
      <text:list xml:id="list2352511212" text:style-name="L10">
        <text:list-item>
          <text:p text:style-name="P18">Client: The user's browser on their device. It sends requests.</text:p>
        </text:list-item>
        <text:list-item>
          <text:p text:style-name="P18">Server: Receives requests from the client, runs the backend logic, and sends responses.</text:p>
        </text:list-item>
        <text:list-item>
          <text:p text:style-name="P18">Database: Stores and retrieves all the necessary data for the application (e.g., user profiles, posts, etc.).</text:p>
        </text:list-item>
        <text:list-item>
          <text:p text:style-name="P18">APIs (Application Programming Interfaces): A set of rules that allow different software applications to communicate with each other. The server might use APIs to talk to the database or other external services.</text:p>
        </text:list-item>
      </text:list>
      <text:p text:style-name="P10"/>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3T11:08:15.809643828</meta:creation-date>
    <dc:date>2025-10-13T11:18:42.792329647</dc:date>
    <meta:editing-duration>PT16S</meta:editing-duration>
    <meta:editing-cycles>1</meta:editing-cycles>
    <meta:document-statistic meta:table-count="0" meta:image-count="0" meta:object-count="0" meta:page-count="4" meta:paragraph-count="74" meta:word-count="1229" meta:character-count="7560" meta:non-whitespace-character-count="6459"/>
    <meta:generator>LibreOffice/7.3.7.2$Linux_X86_64 LibreOffice_project/30$Build-2</meta:generator>
  </office:meta>
</office:document-meta>
</file>